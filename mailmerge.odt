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37DAD9DDDA0244DD884.png" manifest:media-type="image/png"/>
  <manifest:file-entry manifest:full-path="Pictures/100000010000032200000259C82508B701243F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f0f8" officeooo:paragraph-rsid="001ef0f8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1f6c74" officeooo:paragraph-rsid="001f6c7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f0f8" officeooo:paragraph-rsid="001ef0f8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f6c74" officeooo:paragraph-rsid="001f6c7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f6c74" officeooo:paragraph-rsid="001f6c74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f9163" officeooo:paragraph-rsid="001f9163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21e5d8" officeooo:paragraph-rsid="0021e5d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2d260" officeooo:paragraph-rsid="0022d26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2d260" officeooo:paragraph-rsid="0022d260" fo:background-color="#ffff00" style:font-size-asian="14pt" style:font-weight-asian="normal" style:font-size-complex="14pt" style:font-weight-complex="normal"/>
    </style:style>
    <style:style style:name="T1" style:family="text">
      <style:text-properties officeooo:rsid="001f9163"/>
    </style:style>
    <style:style style:name="T2" style:family="text">
      <style:text-properties officeooo:rsid="0022466a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48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sation de thunderbird + mailmerge pour le publipostage</text:p>
      <text:p text:style-name="P3"/>
      <text:list xml:id="list1364040927" text:style-name="L1">
        <text:list-item>
          <text:p text:style-name="P4">On suppose pour la suite que vous utilisez le logiciel de messagerie thunderbird avec l’extension mailmerge.</text:p>
          <text:list>
            <text:list-item>
              <text:p text:style-name="P2"><text:span text:style-name="T3">Vous pouvez télécharger thunderbird </text:span><text:a xlink:type="simple" xlink:href="https://www.thunderbird.net/fr/thunderbird/all/" text:style-name="Internet_20_link" text:visited-style-name="Visited_20_Internet_20_Link"><text:span text:style-name="T3">ici</text:span></text:a></text:p>
            </text:list-item>
            <text:list-item>
              <text:p text:style-name="P2"><text:span text:style-name="T3">Vous pouvez télécharger mailmerge </text:span><text:a xlink:type="simple" xlink:href="https://addons.thunderbird.net/fr/thunderbird/addon/mail-merge/" text:style-name="Internet_20_link" text:visited-style-name="Visited_20_Internet_20_Link"><text:span text:style-name="T3">ici</text:span></text:a></text:p>
            </text:list-item>
          </text:list>
        </text:list-item>
        <text:list-item>
          <text:p text:style-name="P4">récupérez le fichier zip obtenu dans l’onglet secrétariat en cliquant sur « publipostage »</text:p>
        </text:list-item>
        <text:list-item>
          <text:p text:style-name="P4">décompressez ce fichier (dans le répertoire de votre choix). </text:p>
          <text:p text:style-name="P4">Il contient un fichier csv et <text:span text:style-name="T2">un</text:span> sous-répertoires <text:span text:style-name="T2">ECTS</text:span>.</text:p>
          <text:p text:style-name="P6">Si le<text:span text:style-name="T2">s</text:span> emails des étudiants n’o<text:span text:style-name="T2">n</text:span>t pas été renseignés <text:span text:style-name="T2">dans e-colle</text:span>, il faudra les compléter dans le fichier csv (qui s’ouvre avec excel ou libreoffice)</text:p>
        </text:list-item>
        <text:list-item>
          <text:p text:style-name="P4">ouvrez thunderbird et cliquez sur « nouveau message»</text:p>
        </text:list-item>
        <text:list-item>
          <text:p text:style-name="P4">dans le champ « Pour » (celui <text:span text:style-name="T1">où</text:span> o<text:span text:style-name="T1">n</text:span> entre les emails des destinataires) écrivez {{email}}</text:p>
        </text:list-item>
        <text:list-item>
          <text:p text:style-name="P4">dans le champ « Sujet » mettez ce que vous voulez. Si vous voulez insérer des informations spécifiques aux destinataires (nom, prenom) il faut les écrire {{nom}} {{prenom}} pour qu’elles soient remplacées par le nom et / ou prénom du destinataire.</text:p>
        </text:list-item>
        <text:list-item>
          <text:p text:style-name="P6">Écrivez le corps du message. Vous pouvez là encore insérer des informations spécifiques au destinataire (nom/prénom) en les écrivant {{nom}} {{prenom}}</text:p>
        </text:list-item>
        <text:list-item>
          <text:p text:style-name="P4">Cliquez sur l’onglet MailMerge (en haut à droite), <text:span text:style-name="T1">ou bien sur « Envoyer »</text:span>. <text:span text:style-name="T1">Une fenêtre Mail Merge s’ouvre </text:span></text:p>
          <text:list>
            <text:list-item>
              <text:p text:style-name="P6">pour « Source », sélectionnez CSV</text:p>
            </text:list-item>
            <text:list-item>
              <text:p text:style-name="P6">Pour « Carnet d’adresse » sélectionnez le fichier csv obtenu par décompression du fichier zip</text:p>
            </text:list-item>
            <text:list-item>
              <text:p text:style-name="P6">cochez la case « Pièces jointes »</text:p>
            </text:list-item>
            <text:list-item>
              <text:p text:style-name="P6">cliquez sur parcourir et sélectionnez tous les fichiers d<text:span text:style-name="T2">u répertoire ETCS</text:span> obtenu après décompression du fichier zip.</text:p>
            </text:list-item>
            <text:list-item>
              <text:p text:style-name="P6">Dans le champ de texte juste dessous, écrivez {{credit}} et {{attestation}} (ou un seul des 2 si vous ne voulez <text:span text:style-name="T2">n’</text:span>en envoyer qu’un seul)</text:p>
            </text:list-item>
            <text:list-item>
              <text:p text:style-name="P6">Pour le mode de livraison sélectionner « Envoyer plus tard »</text:p>
            </text:list-item>
            <text:list-item>
              <text:p text:style-name="P6">Cliquer sur « <text:s/>Envoyer » (tout en bas à droite), <text:span text:style-name="T2">puis de nouveau sur « envoyer »</text:span></text:p>
            </text:list-item>
            <text:list-item>
              <text:p text:style-name="P7">à ce stade, les emails ne sont pas encore envoyés, ils sont stockés dans « messages en attente ». Cela permet de vérifier que les messages sont corrects (en particulier que les pièces jointes sont bien présentes). Pour les envoyer, il reste à faire un clic droit sur « messages en attente », puis sélectionner « envoyer les messages non envoyés ».</text:p>
            </text:list-item>
          </text:list>
        </text:list-item>
      </text:list>
      <text:p text:style-name="P5"/>
      <text:p text:style-name="P8">au verso un exemple de visuel pour les 2 étapes décrites ci-dessus</text:p>
      <text:p text:style-name="P8"/>
      <text:p text:style-name="P8"/>
      <text:p text:style-name="P8"/>
      <text:p text:style-name="P8"/>
      <text:p text:style-name="P9"><text:soft-page-break/>Première étape : écriture du mail</text:p>
      <text:p text:style-name="P8"><draw:frame draw:style-name="fr2" draw:name="Image1" text:anchor-type="char" svg:x="0cm" svg:y="0.067cm" svg:width="17cm" svg:height="7.541cm" draw:z-index="0"><draw:image xlink:href="Pictures/100000010000032200000259C82508B701243F6B.png" xlink:type="simple" xlink:show="embed" xlink:actuate="onLoad" draw:mime-type="image/png"/></draw:frame></text:p>
      <text:p text:style-name="P9"><draw:frame draw:style-name="fr1" draw:name="Image2" text:anchor-type="char" svg:x="0.064cm" svg:y="0.79cm" svg:width="16.812cm" svg:height="15.812cm" draw:z-index="1"><draw:image xlink:href="Pictures/10000001000003230000037DAD9DDDA0244DD884.png" xlink:type="simple" xlink:show="embed" xlink:actuate="onLoad" draw:mime-type="image/png"/></draw:frame>Deuxième étape : configuration de l’envoi avec MailMer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1:23:56.855049875</meta:creation-date>
    <dc:date>2025-05-07T15:30:30.230096195</dc:date>
    <meta:editing-duration>PT2H25M22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2" meta:paragraph-count="24" meta:word-count="401" meta:character-count="2319" meta:non-whitespace-character-count="1959"/>
  </office:meta>
</office:document-meta>
</file>